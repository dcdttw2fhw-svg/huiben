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1ea14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text-properties fo:font-style="italic" officeooo:paragraph-rsid="001318a5"/>
    </style:style>
    <style:style style:name="P4" style:family="paragraph" style:parent-style-name="Text_20_body">
      <style:text-properties officeooo:paragraph-rsid="001318a5"/>
    </style:style>
    <style:style style:name="P5" style:family="paragraph" style:parent-style-name="Text_20_body" style:list-style-name="L1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officeooo:rsid="0010ee3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Heading_20_2" text:outline-level="2">《你出生的那天》</text:h>
      <text:h text:style-name="Heading_20_3" text:outline-level="3">2025年7月23日·广州</text:h>
      <text:p text:style-name="Text_20_body"><text:span text:style-name="T1">扉页</text:span></text:p>
      <text:p text:style-name="Text_20_body"><text:span text:style-name="T2">（画面：空白背景，中心一个红色小脚印）</text:span></text:p>
      <text:p text:style-name="Text_20_body">献给我最亲爱的宝贝：</text:p>
      <text:p text:style-name="Text_20_body">这是你来到世界第一天的故事。</text:p>
      <text:p text:style-name="Text_20_body">那一天，世界上发生了很多事。</text:p>
      <text:p text:style-name="Text_20_body">有些很大，大到天上的星星都看见了。</text:p>
      <text:p text:style-name="Text_20_body">有些很小，小到只有爸爸和妈妈知道。</text:p>
      <text:p text:style-name="Text_20_body"><text:span text:style-name="T1">第一页 · 夏天等了你很久</text:span></text:p>
      <text:p text:style-name="Text_20_body"><text:span text:style-name="T2">（画面：广州夏日街景大全景——骑楼、榕树、斑驳阳光、远处白云山轮廓）</text:span></text:p>
      <text:p text:style-name="Text_20_body">广州的夏天，等了很久很久。</text:p>
      <text:p text:style-name="Text_20_body">荔枝圆了又圆，芒果熟了又熟。蝉声练了一遍又一遍。木棉的棉絮飘了一回又一回。</text:p>
      <text:p text:style-name="Text_20_body">这座城市在等待什么呢？</text:p>
      <text:p text:style-name="Text_20_body">直到2025年7月23日清晨五点五十一分，太阳从白云山背后露出脸来——</text:p>
      <text:p text:style-name="Text_20_body">它终于等到了。</text:p>
      <text:p text:style-name="Text_20_body"><text:span text:style-name="T1">第二页 · 一个关于起点的日子</text:span></text:p>
      <text:p text:style-name="Text_20_body"><text:span text:style-name="T2">（画面：分镜——</text:span><text:span text:style-name="T3">上</text:span><text:span text:style-name="T2">边是南湖红船的历史素描剪影，下边是产房里灯光照在墙上，映射出妈妈比耶的手势）</text:span></text:p>
      <text:p text:style-name="Text_20_body">你出生的那天，还是一个特别的纪念日。</text:p>
      <text:p text:style-name="Text_20_body">很多很多年前的7月23日，在另一座城市，一群人悄悄聚在一艘小船上。他们很年轻，口袋很空，但眼睛里烧着火。那艘船后来改变了一个国家。</text:p>
      <text:p text:style-name="Text_20_body">而你，在将近一个世纪之后的同一天，来到了这个他们为之奋斗过的世界。</text:p>
      <text:p text:style-name="Text_20_body">有些日子，天生就是为了被记住的。</text:p>
      <text:p text:style-name="Text_20_body"><text:span text:style-name="T1">第三页 · 太阳的脚印</text:span></text:p>
      <text:p text:style-name="Text_20_body"><text:span text:style-name="T2">（画面：太阳特写，光芒温柔地穿透云层照向城市一角的小窗户，小窗户里透出暖光，里面外婆奶奶爸爸正盯着墙壁上的显示屏，焦急等待）</text:span></text:p>
      <text:p text:style-name="Text_20_body"/>
      <text:p text:style-name="Text_20_body"><text:soft-page-break/>于是他停了一下，多照了你一会儿。就一会儿。</text:p>
      <text:p text:style-name="Text_20_body">所以他记住了你的脸。</text:p>
      <text:p text:style-name="Text_20_body"><text:span text:style-name="T1">第四页 · 最热的日子，最甜的果</text:span></text:p>
      <text:p text:style-name="P1"><text:span text:style-name="T2">（画面：表针指向十四点三十七分，护士从产房把你推出来，外婆奶奶爸爸都冲上去，窗户外面一个芒果刚好熟透落地）</text:span></text:p>
      <text:p text:style-name="Text_20_body">你顶着最热的时间来到我们身边，十四点三十七分，是一个值得铭记的时刻</text:p>
      <text:p text:style-name="Text_20_body">可这座城市从不怕热。它的热，化成了荔枝的甜、芒果的香、夜晚凉茶摊上咕嘟咕嘟冒着的泡。</text:p>
      <text:p text:style-name="Text_20_body">你是这盛夏里结出的果实。</text:p>
      <text:p text:style-name="Text_20_body">最热的日子，最甜的果。</text:p>
      <text:p text:style-name="P1"><text:span text:style-name="T1">第五页 ·邹鸣律<text:line-break/>（画面：小宝贝手指指着，而旁边是一个寓言故事，邹生吹律）</text:span></text:p>
      <text:p text:style-name="P2">邹生吹律，是你名字的起源</text:p>
      <text:p text:style-name="P2">对于爸爸妈妈来说，这意味着好事发生，你是最温暖的风，吹进了我们家</text:p>
      <text:p text:style-name="P2">第六页 · 四万八千个出发</text:p>
      <text:p text:style-name="Text_20_body"><text:span text:style-name="T2">（画面：火车站台，年轻人们背着行囊排队上车，阳光从玻璃屋顶洒下来，他们脸上有笑。画面左下角是一个小小的婴儿床一角，你出生了）</text:span></text:p>
      <text:p text:style-name="Text_20_body">你来到世界的同一天，四万八千个年轻人正带着行李，从中国各地出发。</text:p>
      <text:p text:style-name="Text_20_body">他们是西部计划的志愿者，坐火车、转大巴，穿过一座又一座山，去点亮一盏盏灯。</text:p>
      <text:p text:style-name="Text_20_body">而你，刚刚踏上人生的第一条路。</text:p>
      <text:p text:style-name="Text_20_body">四万八千零一个出发——他们去往西部，你来到我们身边。</text:p>
      <text:p text:style-name="Text_20_body"><text:span text:style-name="T1">第七页 · 月亮的新生</text:span></text:p>
      <text:p text:style-name="Text_20_body"><text:span text:style-name="T2">（画面：同一个夜空，一弯极细的新月悄悄出现在天边，天上的星星亮闪闪。画面下方，一只婴儿的手轻轻握着大人的一根手指）</text:span></text:p>
      <text:p text:style-name="Text_20_body">月亮只差一天，就要开始一个新的轮回。</text:p>
      <text:p text:style-name="Text_20_body">她悄悄告诉你一个秘密：结束和开始，其实是同一件事。</text:p>
      <text:p text:style-name="Text_20_body">就像你在妈妈肚子里最后一天，也是你来到世界的第一天。</text:p>
      <text:p text:style-name="Text_20_body"/>
      <text:p text:style-name="Text_20_body"><text:span text:style-name="T1">第八页 · 你的守护星</text:span></text:p>
      <text:p text:style-name="Text_20_body"><text:span text:style-name="T2">（画面：天蝎座星图特写，心宿二以醒目的红色光芒占据视觉中心。星光洒向下方一个爸爸用勺子不熟练给婴儿喂奶）</text:span></text:p>
      <text:p text:style-name="Text_20_body">那天入夜，东南方的天空升起一只巨大的蝎子，叫天蝎座。</text:p>
      <text:p text:style-name="Text_20_body"><text:soft-page-break/>它最亮的那颗心，叫“心宿二”——一颗比太阳大七百倍的红宝石。</text:p>
      <text:p text:style-name="Text_20_body">那颗星星整夜亮着，一动不动地看着你的窗户，它是你出生夜的守护星。</text:p>
      <text:p text:style-name="Text_20_body"/>
      <text:p text:style-name="Text_20_body"><text:span text:style-name="T1">第九页 · 芒果熟透了</text:span></text:p>
      <text:p text:style-name="Text_20_body"><text:span text:style-name="T2">（画面：坐标攀枝花：低角度仰拍，芒果树干粗壮，金黄果实压弯枝条几乎垂到地面，人行道地砖缝里冒出几株小草，一颗芒果静静躺在光影里）</text:span></text:p>
      <text:p text:style-name="Text_20_body">你出生的那天，攀枝花街头的芒果正沉甸甸地挂在枝头。</text:p>
      <text:p text:style-name="Text_20_body">果子太多太满了，枝条都快托不住。有时候“啪”的一声，一颗熟透的芒果掉在人行道上。</text:p>
      <text:p text:style-name="Text_20_body">整座城市都是甜腻的果香。</text:p>
      <text:p text:style-name="Text_20_body">你闻到的第一阵风，是水果味的。</text:p>
      <text:p text:style-name="Text_20_body"><text:span text:style-name="T1">第十页 · 庐山架起一座云做的桥</text:span></text:p>
      <text:p text:style-name="Text_20_body"><text:span text:style-name="T2">（画面：庐山云海翻涌，两峰之间云桥横跨，气势磅礴又轻盈如梦。云桥上方，隐隐有一只白鹤飞过）</text:span></text:p>
      <text:p text:style-name="Text_20_body">那天清晨，庐山的云海翻涌出一座“天桥”。</text:p>
      <text:p text:style-name="Text_20_body">云从山谷间升起来，搭在两座山峰之间，像一座没有钉子的拱桥。没有人走上去，它是天空自己搭着玩的。</text:p>
      <text:p text:style-name="Text_20_body">但是其实爸爸妈妈知道，它是为了我们皮皮搭起来的桥</text:p>
      <text:p text:style-name="Text_20_body"><text:span text:style-name="T1">第十一页 · 鄱阳湖变成一面镜子</text:span></text:p>
      <text:p text:style-name="Text_20_body"><text:span text:style-name="T2">（画面：夕阳下的鄱阳湖，水面完全静止，霞光倒影与天空无缝衔接，芦苇丛边一只白鹭单脚立着，一动不动）</text:span></text:p>
      <text:p text:style-name="Text_20_body">同一天傍晚，鄱阳湖的水面静得没有一丝波纹。</text:p>
      <text:p text:style-name="Text_20_body">晚霞倒映在水里，分不清哪个是天，哪个是湖。有人拍下照片，说那是“天空之镜”。</text:p>
      <text:p text:style-name="Text_20_body">可他们不知道，那天水面为什么格外平静。</text:p>
      <text:p text:style-name="Text_20_body">因为你来的时候，世界屏了一下呼吸。</text:p>
      <text:p text:style-name="Text_20_body"><text:span text:style-name="T1">第十二页 · 两道彩虹</text:span></text:p>
      <text:p text:style-name="Text_20_body"><text:span text:style-name="T2">（画面：九江武宁的山水间，双层彩虹跨越天际，内圈浓外圈淡，一条小船正从桥洞下悠悠划过）</text:span></text:p>
      <text:p text:style-name="Text_20_body">也是那天，九江武宁的天空，出现了两道彩虹。</text:p>
      <text:p text:style-name="Text_20_body">一道浓一些，一道淡一些，像天空画了一道，又怕不够，再补一道。</text:p>
      <text:p text:style-name="Text_20_body">气象台说，那是太阳照在水滴上，折了两次光。</text:p>
      <text:p text:style-name="Text_20_body">但那天看见双彩虹的老人都说——一定有什么特别的事发生了。</text:p>
      <text:p text:style-name="Text_20_body">是的。那天，你来了。</text:p>
      <text:p text:style-name="Text_20_body">一道彩虹给今天的你，一道彩虹给未来的你。</text:p>
      <text:p text:style-name="Text_20_body"><text:soft-page-break/><text:span text:style-name="T1">第十三页 · 上杭的清爽</text:span></text:p>
      <text:p text:style-name="P3">（画面：左边坐标：上杭岭头，一群老人在竹林下遮荫，一个老人正在接电话，露出非常开心的笑容，小风刚好吹过<text:line-break/>右边是坐标：四川南充，一个光头的中年男人焦急等待，看着手机哈哈大笑）</text:p>
      <text:p text:style-name="P3">在我们老家岭头，祖母焦急等待着你的诞生</text:p>
      <text:p text:style-name="P3">在我们老家南充，外公焦急等待着你的诞生<text:line-break/>岭头竹林，是未来酷暑，你最好的遮挡，会在每一个夏天，给你带来一阵凉风</text:p>
      <text:p text:style-name="P3">南充美食，是我们未来一顿一顿享受的美味</text:p>
      <text:p text:style-name="P3">在皮皮出生那一时间，两个远远的地方相互都充满笑容</text:p>
      <text:p text:style-name="Text_20_body"><text:span text:style-name="T1">第十四页 · 云南的守候</text:span></text:p>
      <text:p text:style-name="Text_20_body"><text:span text:style-name="T2">（画面：云南高黎贡山密林深处，苔藓和落叶之间，三株暖地杓兰静静绽放，斑驳的阳光穿过树冠洒在花瓣上。画面一角，护林员的手正轻轻拨开一片叶子）</text:span></text:p>
      <text:p text:style-name="Text_20_body">你出生那天，在云南腾冲的高山上，护林员在巡查时停下了脚步。</text:p>
      <text:p text:style-name="P4">三株暖地杓兰，静静地开在苔藓和落叶之间。</text:p>
      <text:p text:style-name="P4">这种兰花极其稀有，偏偏选择在这一年，这一天，被人类看见。</text:p>
      <text:p text:style-name="Text_20_body">而你，也是那一天，被我们看见的。</text:p>
      <text:p text:style-name="Text_20_body">有些生命，生来就是为了让人惊叹。它用了多少年在深山等待，你用了十个月在妈妈肚子里等待。</text:p>
      <text:p text:style-name="Text_20_body">欢迎来到世界！！！</text:p>
      <text:p text:style-name="Text_20_body"><text:span text:style-name="T1">第十五页 · 两个古老的邻居</text:span></text:p>
      <text:p text:style-name="Text_20_body"><text:span text:style-name="T2">（画面：喜马拉雅山脉宏大远景，雪山在夕阳下泛金光。山的这一边和那一边各有一扇亮着灯的窗，遥遥相望）</text:span></text:p>
      <text:p text:style-name="Text_20_body">那一天，喜马拉雅山的另一边，两个古老的邻居——中国和印度——坐在桌前，说了一些很久没说过的、温和的话。</text:p>
      <text:p text:style-name="Text_20_body">山太高了，有时候连善意都需要翻很久才到。</text:p>
      <text:p text:style-name="Text_20_body">但你出生的那天，善意刚好翻过了山口。</text:p>
      <text:p text:style-name="Text_20_body">你来的那天，就是这样一个日子。</text:p>
      <text:p text:style-name="Text_20_body"><text:span text:style-name="T1">第十六页 · 37万分之一，以及从天而降的你</text:span></text:p>
      <text:p text:style-name="Text_20_body"><text:span text:style-name="T2">（画面：地球从太空的视角，陆地被蓝色海洋包围。地球上密布着无数个小小的光点。画面一角，一个棒球场里，热狗从直升机上飘落，观众们仰头笑着伸手去接。另一个角，产房的窗里透出暖光）</text:span></text:p>
      <text:p text:style-name="Text_20_body">你来到世界的那一天，37万个新生儿，在各自的时区里，第一次张开嘴呼吸。他们有的在冰岛，有的在非洲，有的在太平洋的小岛上。</text:p>
      <text:p text:style-name="Text_20_body"><text:soft-page-break/>而在大洋彼岸，一座棒球场上正发生一件奇怪的事——一架直升机飞到球场上空，投下了两千六百个热狗。观众们仰着头，笑着、接着。</text:p>
      <text:p text:style-name="Text_20_body">那是他们投喂球迷的方式。</text:p>
      <text:p text:style-name="Text_20_body">而对我们家来说——上天投下了你。</text:p>
      <text:p text:style-name="Text_20_body">比两千六百个热狗加起来还要珍贵的你。</text:p>
      <text:p text:style-name="Text_20_body"><text:span text:style-name="T1">第十七页 · 五羊嘴里叼着稻穗</text:span></text:p>
      <text:p text:style-name="Text_20_body"><text:span text:style-name="T2">（画面：越秀公园五羊石像，阳光从侧面照亮五羊轮廓。最高那只羊嘴里稻穗的穗尖刚好指向城市的方向。石像前的广场上，有一个推着婴儿车走过的剪影）</text:span></text:p>
      <text:p text:style-name="Text_20_body">越秀山上，五只石羊已经站了好多年。</text:p>
      <text:p text:style-name="Text_20_body">嘴里叼着稻穗的那一只，一直保持着同一个姿势。她在等什么呢？</text:p>
      <text:p text:style-name="Text_20_body">你出生的那天，她微微抬了一下头。</text:p>
      <text:p text:style-name="Text_20_body">有人说风太大。有人说眼花了。</text:p>
      <text:p text:style-name="Text_20_body">但我告诉你——她又多了一个要守护的孩子。</text:p>
      <text:p text:style-name="Text_20_body"><text:span text:style-name="T1">第十八页 · 木棉的种子在飞</text:span></text:p>
      <text:p text:style-name="Text_20_body"><text:span text:style-name="T2">（画面：骑楼街的视角，巷弄里阳光斜照，无数白色棉絮飘在空中，像下了一场无声的雪。一个奶奶牵着孙子站在骑楼下，抬头望着飘絮）</text:span></text:p>
      <text:p text:style-name="Text_20_body">木棉是广州的市花，是攀枝花。春天她满树火红，像举着一万朵小太阳。</text:p>
      <text:p text:style-name="Text_20_body">但七月是木棉结果的日子。裂开的果实在种子送往各处，你出生那天，木棉正在用另一种方式开花。</text:p>
      <text:p text:style-name="Text_20_body">春天用红色。夏天用白色。</text:p>
      <text:p text:style-name="Text_20_body"><text:span text:style-name="T1">第十九页 · 日历上没有的那一天</text:span></text:p>
      <text:p text:style-name="Text_20_body"><text:span text:style-name="T2">（画面：一本翻开的日历，7月23日那一页被撕下来，贴在墙上。旁边是另一本手写的小本子，第一页写着“第1天”，字迹有点歪，旁边按着一个红色小脚印）</text:span></text:p>
      <text:p text:style-name="Text_20_body">2025年7月23日。</text:p>
      <text:p text:style-name="Text_20_body">不是元旦，不是春节，不是中秋，不是国庆。</text:p>
      <text:p text:style-name="Text_20_body">但有两个人的日历，从这一页开始重新编号。</text:p>
      <text:p text:style-name="P4">对我们而言，是最重要的日子。</text:p>
      <text:p text:style-name="Text_20_body">第一天。第二天。第三天……</text:p>
      <text:p text:style-name="Text_20_body">宝贝，你来的那一天，是我们重大的起点</text:p>
      <text:p text:style-name="Text_20_body"><text:span text:style-name="T1">第二十页 · 封底</text:span></text:p>
      <text:p text:style-name="Text_20_body"><text:span text:style-name="T2">（画面：一张婴儿床的俯瞰角度，宝宝睡着了，小拳头微微松开。窗外是广州的夜空，天蝎座的心宿二正亮着红光。远处小蛮腰的灯光柔和地变换着颜色。画面下方一行小字）</text:span></text:p>
      <text:p text:style-name="Text_20_body"><text:soft-page-break/>那天，太阳记住了你的脸。</text:p>
      <text:p text:style-name="Text_20_body">月亮藏起来为你让路。</text:p>
      <text:p text:style-name="Text_20_body">一颗比太阳大七百倍的星星整夜守着你。</text:p>
      <text:p text:style-name="Text_20_body">整座城市的芒果都为你甜。</text:p>
      <text:p text:style-name="Text_20_body">而你只是用力蹬了一下小腿。</text:p>
      <text:p text:style-name="Text_20_body">世界就这么轻易被你改变了。</text:p>
      <text:p text:style-name="Horizontal_20_Line"/>
      <text:p text:style-name="Text_20_body">以上为20页完整绘本文本。如需要，我可以继续帮你：</text:p>
      <text:list text:style-name="L1">
        <text:list-item>
          <text:p text:style-name="P5">补充版权页、献词页的文案</text:p>
        </text:list-item>
        <text:list-item>
          <text:p text:style-name="P5">按照印刷对页（跨页）重新编排页码和画面建议</text:p>
        </text:list-item>
        <text:list-item>
          <text:p text:style-name="P5">写一段给插画师的总体风格说明</text:p>
        </text:list-item>
        <text:list-item>
          <text:p text:style-name="P5">制作亲子朗读版（每页底部加上“读到这里时可以抱抱宝宝”之类的互动提示）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30T08:47:52.386714100</meta:creation-date>
    <dc:date>2026-07-02T14:06:42.225426100</dc:date>
    <meta:editing-duration>PT4H38M40S</meta:editing-duration>
    <meta:editing-cycles>1</meta:editing-cycles>
    <meta:document-statistic meta:table-count="0" meta:image-count="0" meta:object-count="0" meta:page-count="6" meta:paragraph-count="136" meta:word-count="3548" meta:character-count="3630" meta:non-whitespace-character-count="3588"/>
    <meta:generator>LibreOffice/26.2.4.2$Windows_X86_64 LibreOffice_project/0229ac93fcf0d7cbc6376066c6f35021cef002dc</meta:generator>
  </office:meta>
</office:document-meta>
</file>